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paragraph-properties fo:margin-top="0cm" fo:margin-bottom="0.423cm" style:contextual-spacing="false"/>
    </style:style>
    <style:style style:name="P3" style:family="paragraph" style:parent-style-name="List_20_Paragraph" style:list-style-name="WWNum2">
      <style:paragraph-properties fo:margin-top="0cm" fo:margin-bottom="0.318cm" style:contextual-spacing="false"/>
    </style:style>
    <style:style style:name="P4" style:family="paragraph" style:parent-style-name="List_20_Paragraph" style:list-style-name="WWNum2">
      <style:paragraph-properties fo:margin-top="0cm" fo:margin-bottom="0.529cm" style:contextual-spacing="false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529cm" style:contextual-spacing="false" fo:text-align="center" style:justify-single-word="false"/>
    </style:style>
    <style:style style:name="P7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/>
    </style:style>
    <style:style style:name="T1" style:family="text">
      <style:text-properties fo:color="#1a237e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283593" loext:opacity="100%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OJECT ABSTRACT</text:span></text:p>
      <text:p text:style-name="P6"><text:span text:style-name="T2">Implementation and Comparison of D-Algorithm and PODEM for ATPG with Scan Chain DFT</text:span></text:p>
      <text:h text:style-name="Heading_20_1" text:outline-level="1">OBJECTIVE</text:h>
      <text:p text:style-name="P8">To implement a complete DFT flow demonstrating scan chain insertion and comparing two ATPG algorithms for sequential circuit testing:</text:p>
      <text:list xml:id="list4018871046" text:style-name="WWNum2">
        <text:list-item text:start-value="1">
          <text:p text:style-name="P1">Design a sequential circuit with flip-flops</text:p>
        </text:list-item>
        <text:list-item>
          <text:p text:style-name="P1">Insert scan chain for improved testability</text:p>
        </text:list-item>
        <text:list-item>
          <text:p text:style-name="P1">Implement D-Algorithm manually for scan-based ATPG</text:p>
        </text:list-item>
        <text:list-item>
          <text:p text:style-name="P1">Implement PODEM using automated ATPG tools in scan mode</text:p>
        </text:list-item>
        <text:list-item>
          <text:p text:style-name="P1">Generate test vectors for stuck-at faults with scan access</text:p>
        </text:list-item>
        <text:list-item>
          <text:p text:style-name="P1">Compare ATPG effectiveness with and without scan</text:p>
        </text:list-item>
        <text:list-item>
          <text:p text:style-name="P2">Analyze fault coverage improvement through scan chain DFT</text:p>
        </text:list-item>
      </text:list>
      <text:h text:style-name="Heading_20_1" text:outline-level="1">WORK PLAN</text:h>
      <text:h text:style-name="Heading_20_2" text:outline-level="2">Phase 1: Design &amp; Synthesis</text:h>
      <text:list xml:id="list232130371520035" text:continue-numbering="true" text:style-name="WWNum2">
        <text:list-item>
          <text:p text:style-name="P1">Install tools: Yosys, ATALANTA, Icarus Verilog</text:p>
        </text:list-item>
        <text:list-item>
          <text:p text:style-name="P1">Create sequential circuit RTL design (e.g., Counter, State Machine)</text:p>
        </text:list-item>
        <text:list-item>
          <text:p text:style-name="P1">Synthesize RTL to gate-level netlist</text:p>
        </text:list-item>
        <text:list-item>
          <text:p text:style-name="P3">Analyze controllability and observability without scan</text:p>
        </text:list-item>
      </text:list>
      <text:h text:style-name="Heading_20_2" text:outline-level="2">Phase 2: Scan Chain Insertion (DFT)</text:h>
      <text:list xml:id="list232130920484301" text:continue-numbering="true" text:style-name="WWNum2">
        <text:list-item>
          <text:p text:style-name="P1">Replace regular flip-flops with scan flip-flops</text:p>
        </text:list-item>
        <text:list-item>
          <text:p text:style-name="P1">Connect flip-flops in scan chain (SI → FF1 → FF2 → SO)</text:p>
        </text:list-item>
        <text:list-item>
          <text:p text:style-name="P1">Add scan enable (SE) control signal</text:p>
        </text:list-item>
        <text:list-item>
          <text:p text:style-name="P3">Re-synthesize design with scan structure</text:p>
        </text:list-item>
      </text:list>
      <text:h text:style-name="Heading_20_2" text:outline-level="2">Phase 3: D-Algorithm Implementation</text:h>
      <text:list xml:id="list232131739456666" text:continue-numbering="true" text:style-name="WWNum2">
        <text:list-item>
          <text:p text:style-name="P1">Manually select target stuck-at fault in combinational logic</text:p>
        </text:list-item>
        <text:list-item>
          <text:p text:style-name="P1">Use scan chain to set required flip-flop states</text:p>
        </text:list-item>
        <text:list-item>
          <text:p text:style-name="P1">Perform fault activation, propagation, and justification</text:p>
        </text:list-item>
        <text:list-item>
          <text:p text:style-name="P1">Generate test sequence: scan-in → capture → scan-out</text:p>
        </text:list-item>
        <text:list-item>
          <text:p text:style-name="P3">Verify using simulation with scan mode</text:p>
        </text:list-item>
      </text:list>
      <text:h text:style-name="Heading_20_2" text:outline-level="2">Phase 4: PODEM Implementation</text:h>
      <text:list xml:id="list232131350861640" text:continue-numbering="true" text:style-name="WWNum2">
        <text:list-item>
          <text:p text:style-name="P1">Execute ATALANTA in scan mode on gate-level netlist</text:p>
        </text:list-item>
        <text:list-item>
          <text:p text:style-name="P1">Analyze automatically generated scan test vectors</text:p>
        </text:list-item>
        <text:list-item>
          <text:p text:style-name="P1">Observe scan patterns (shift cycles + capture cycles)</text:p>
        </text:list-item>
        <text:list-item>
          <text:p text:style-name="P3">Study fault coverage with scan access</text:p>
        </text:list-item>
      </text:list>
      <text:h text:style-name="Heading_20_2" text:outline-level="2">Phase 5: Comparison &amp; Analysis</text:h>
      <text:list xml:id="list232131483001737" text:continue-numbering="true" text:style-name="WWNum2">
        <text:list-item>
          <text:p text:style-name="P1">Compare D-Algorithm vs PODEM methodologies</text:p>
        </text:list-item>
        <text:list-item>
          <text:p text:style-name="P1">Analyze fault coverage: without scan vs with scan</text:p>
        </text:list-item>
        <text:list-item>
          <text:p text:style-name="P1">Evaluate DFT benefits: improved controllability/observability</text:p>
        </text:list-item>
        <text:list-item>
          <text:p text:style-name="P1"><text:soft-page-break/>Document test vector count and test application time</text:p>
        </text:list-item>
        <text:list-item>
          <text:p text:style-name="P2">Prepare technical report and presentation</text:p>
        </text:list-item>
      </text:list>
      <text:h text:style-name="Heading_20_1" text:outline-level="1">TOOLS USED</text:h>
      <text:list xml:id="list232132343220801" text:continue-numbering="true" text:style-name="WWNum2">
        <text:list-item>
          <text:p text:style-name="P1"><text:span text:style-name="T3">Yosys</text:span> - Synthesis tool for RTL to gate-level with scan insertion</text:p>
        </text:list-item>
        <text:list-item>
          <text:p text:style-name="P1"><text:span text:style-name="T3">ATALANTA</text:span> - ATPG tool with scan mode support for PODEM algorithm</text:p>
        </text:list-item>
        <text:list-item>
          <text:p text:style-name="P1"><text:span text:style-name="T3">Icarus Verilog</text:span> - Simulator for testbench verification with scan patterns</text:p>
        </text:list-item>
        <text:list-item>
          <text:p text:style-name="P2"><text:span text:style-name="T3">GTKWave</text:span> - Waveform viewer for analyzing scan shift and capture cycles</text:p>
        </text:list-item>
      </text:list>
      <text:h text:style-name="Heading_20_1" text:outline-level="1">KEY DFT CONCEPTS DEMONSTRATED</text:h>
      <text:list xml:id="list232131342236757" text:continue-numbering="true" text:style-name="WWNum2">
        <text:list-item>
          <text:p text:style-name="P1"><text:span text:style-name="T3">Scan Chain Design: </text:span>Serial shift register for test data access</text:p>
        </text:list-item>
        <text:list-item>
          <text:p text:style-name="P1"><text:span text:style-name="T3">Controllability: </text:span>Ability to set internal states via scan-in</text:p>
        </text:list-item>
        <text:list-item>
          <text:p text:style-name="P1"><text:span text:style-name="T3">Observability: </text:span>Ability to observe internal states via scan-out</text:p>
        </text:list-item>
        <text:list-item>
          <text:p text:style-name="P1"><text:span text:style-name="T3">Test Pattern: </text:span>Scan-in → Capture → Scan-out sequence</text:p>
        </text:list-item>
        <text:list-item>
          <text:p text:style-name="P1"><text:span text:style-name="T3">Fault Coverage: </text:span>Improvement from ~60% (no scan) to ~95%+ (with scan)</text:p>
        </text:list-item>
        <text:list-item>
          <text:p text:style-name="P4"><text:span text:style-name="T3">Sequential ATPG: </text:span>Test generation for circuits with memory elements</text:p>
        </text:list-item>
      </text:list>
      <text:p text:style-name="P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IN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318cm" style:contextual-spacing="false"/>
      <style:text-properties fo:color="#1a237e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212cm" style:contextual-spacing="false"/>
      <style:text-properties fo:color="#283593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2-04T17:39:26.270000000</meta:creation-date>
    <dc:date>2026-02-04T23:21:30.201551560</dc:date>
    <meta:editing-duration>PT9M33S</meta:editing-duration>
    <meta:document-statistic meta:table-count="0" meta:image-count="0" meta:object-count="0" meta:page-count="2" meta:paragraph-count="51" meta:word-count="404" meta:character-count="2539" meta:non-whitespace-character-count="2225"/>
    <meta:generator>LibreOffice/7.3.7.2$Linux_X86_64 LibreOffice_project/30$Build-2</meta:generator>
  </office:meta>
</office:document-meta>
</file>