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Bullet" style:list-style-name="WWNum1"/>
    <style:style style:name="T1" style:family="text">
      <style:text-properties style:font-name="Courier New" fo:font-size="9pt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2-02T22:51:07.301485607</dc:date>
    <meta:editing-duration>PT20M47S</meta:editing-duration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